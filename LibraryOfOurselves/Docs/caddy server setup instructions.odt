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64aa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Preformatted_20_Text">
      <style:text-properties officeooo:paragraph-rsid="002364aa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5e1be"/>
    </style:style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1"/>
    <style:style style:name="T1" style:family="text">
      <style:text-properties officeooo:rsid="002364aa"/>
    </style:style>
    <style:style style:name="T2" style:family="text">
      <style:text-properties fo:font-variant="normal" fo:text-transform="none" fo:color="#0969da" loext:opacity="100%" fo:font-family="'Mona Sans VF', apple-system, system-ui, 'Segoe UI', 'Noto Sans', Helvetica, Arial, sans-serif, 'Apple Color Emoji', 'Segoe UI Emoji'" fo:font-size="10.5pt" fo:letter-spacing="normal" fo:font-style="normal" style:text-underline-style="solid" style:text-underline-width="auto" style:text-underline-color="font-color" fo:font-weight="bold" fo:background-color="#ffffff" loext:char-shading-value="0"/>
    </style:style>
    <style:style style:name="T3" style:family="text">
      <style:text-properties officeooo:rsid="0027353f"/>
    </style:style>
    <style:style style:name="T4" style:family="text">
      <style:text-properties officeooo:rsid="001f7231"/>
    </style:style>
    <style:style style:name="T5" style:family="text">
      <style:text-properties officeooo:rsid="002094e4"/>
    </style:style>
    <style:style style:name="T6" style:family="text">
      <style:text-properties officeooo:rsid="00228dfa"/>
    </style:style>
    <style:style style:name="T7" style:family="text">
      <style:text-properties officeooo:rsid="0025e1be"/>
    </style:style>
    <style:style style:name="T8" style:family="text">
      <style:text-properties officeooo:rsid="0026d7a6"/>
    </style:style>
    <style:style style:name="T9" style:family="text">
      <style:text-properties officeooo:rsid="0027bad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1" text:outline-level="1">Quest Content Server Setup</text:h>
      <text:h text:style-name="Heading_20_2" text:outline-level="2">1. Install Caddy</text:h>
      <text:p text:style-name="Text_20_body">Download Caddy from:</text:p>
      <text:p text:style-name="P1"><text:a xlink:type="simple" xlink:href="https://github.com/caddyserver/caddy/releases" text:style-name="Internet_20_link" text:visited-style-name="Visited_20_Internet_20_Link">https://github.com/caddyserver/caddy/releases</text:a> </text:p>
      <text:p text:style-name="P1"><text:span text:style-name="T1">Download the following file : </text:span><text:span text:style-name="T2">caddy_2.11.4_windows_arm64.zip</text:span></text:p>
      <text:p text:style-name="Text_20_body">Extract the executable somewhere convenient, for example:</text:p>
      <text:section text:style-name="Sect1" text:name="code-block-viewer">
        <text:p text:style-name="P2"><text:span text:style-name="Source_20_Text">C:\</text:span><text:span text:style-name="Source_20_Text"><text:span text:style-name="T1">c</text:span></text:span><text:span text:style-name="Source_20_Text">addy\</text:span></text:p>
      </text:section>
      <text:p text:style-name="Horizontal_20_Line"/>
      <text:h text:style-name="Heading_20_2" text:outline-level="2">2. Create the deployment folder</text:h>
      <text:p text:style-name="Text_20_body">Example:</text:p>
      <text:section text:style-name="Sect1" text:name="Section1">
        <text:p text:style-name="P3"><text:span text:style-name="Source_20_Text"><text:span text:style-name="T1">Deploy</text:span></text:span><text:span text:style-name="Source_20_Text">/</text:span></text:p>
        <text:p text:style-name="Preformatted_20_Text"><text:span text:style-name="Source_20_Text">│</text:span></text:p>
        <text:p text:style-name="Preformatted_20_Text"><text:span text:style-name="Source_20_Text">├── manifest.json</text:span></text:p>
        <text:p text:style-name="Preformatted_20_Text"><text:span text:style-name="Source_20_Text">├── generate</text:span><text:span text:style-name="Source_20_Text"><text:span text:style-name="T3">_</text:span></text:span><text:span text:style-name="Source_20_Text">manifest.</text:span><text:span text:style-name="Source_20_Text"><text:span text:style-name="T4">sh</text:span></text:span></text:p>
        <text:p text:style-name="Preformatted_20_Text"><text:span text:style-name="Source_20_Text">└── </text:span><text:span text:style-name="Source_20_Text"><text:span text:style-name="T1">Content</text:span></text:span><text:span text:style-name="Source_20_Text">/</text:span></text:p>
        <text:p text:style-name="Preformatted_20_Text"><text:span text:style-name="Source_20_Text"><text:s text:c="4"/>├── Guide/</text:span></text:p>
        <text:p text:style-name="P4"><text:span text:style-name="Source_20_Text"><text:tab/> <text:s text:c="3"/>├── </text:span><text:span text:style-name="Source_20_Text"><text:span text:style-name="T1">Jonah</text:span></text:span><text:span text:style-name="Source_20_Text">Guide.</text:span><text:span text:style-name="Source_20_Text"><text:span text:style-name="T1">mp4</text:span></text:span></text:p>
        <text:p text:style-name="P4"><text:span text:style-name="Source_20_Text"><text:s text:c="4"/>├── </text:span><text:span text:style-name="Source_20_Text"><text:span text:style-name="T1">User</text:span></text:span><text:span text:style-name="Source_20_Text">/</text:span></text:p>
        <text:p text:style-name="P4"><text:span text:style-name="Source_20_Text"><text:tab/> <text:s text:c="3"/>├── </text:span><text:span text:style-name="Source_20_Text"><text:span text:style-name="T1">Jonah.mp4</text:span></text:span><text:span text:style-name="Source_20_Text">/</text:span></text:p>
        <text:p text:style-name="P4"><text:span text:style-name="Source_20_Text"/></text:p>
      </text:section>
      <text:p text:style-name="Text_20_body">This folder contains all content that will be served to the Quest headsets.</text:p>
      <text:p text:style-name="Horizontal_20_Line"/>
      <text:h text:style-name="Heading_20_2" text:outline-level="2">3. Generate the manifest</text:h>
      <text:p text:style-name="Text_20_body">Whenever videos are added, removed, or updated, regenerate the manifest:</text:p>
      <text:section text:style-name="Sect1" text:name="Section2">
        <text:p text:style-name="P2"><text:span text:style-name="Source_20_Text">./</text:span><text:span text:style-name="Source_20_Text"><text:span text:style-name="T5">generate_manifest.sh</text:span></text:span></text:p>
      </text:section>
      <text:p text:style-name="Text_20_body">This updates <text:span text:style-name="Source_20_Text">manifest.json</text:span> with the latest file sizes and SHA-256 hashes.</text:p>
      <text:p text:style-name="Horizontal_20_Line"/>
      <text:h text:style-name="Heading_20_2" text:outline-level="2">4. Start the server</text:h>
      <text:p text:style-name="Text_20_body">Open PowerShell in the deployment folder:</text:p>
      <text:section text:style-name="Sect1" text:name="Section3">
        <text:p text:style-name="P2"><text:bookmark text:name="code-block-viewer Copy 2"/><text:span text:style-name="Source_20_Text">cd C:\</text:span><text:span text:style-name="Source_20_Text"><text:span text:style-name="T6">caddy\</text:span></text:span><text:span text:style-name="Source_20_Text">Deploy</text:span></text:p>
      </text:section>
      <text:p text:style-name="Text_20_body">Start Caddy:</text:p>
      <text:section text:style-name="Sect1" text:name="Section4">
        <text:p text:style-name="P2"><text:bookmark text:name="code-block-viewer Copy 3"/><text:span text:style-name="Source_20_Text">caddy file-server --listen :8080</text:span></text:p>
      </text:section>
      <text:p text:style-name="Text_20_body"><text:soft-page-break/>You should see output indicating the server is listening on port 8080.</text:p>
      <text:p text:style-name="Horizontal_20_Line"/>
      <text:h text:style-name="Heading_20_2" text:outline-level="2">5. Test locally</text:h>
      <text:p text:style-name="Text_20_body">Open a browser on the server PC:</text:p>
      <text:section text:style-name="Sect1" text:name="Section5">
        <text:p text:style-name="P2"><text:bookmark text:name="code-block-viewer Copy 4"/><text:span text:style-name="Source_20_Text">http://localhost:8080/</text:span></text:p>
      </text:section>
      <text:p text:style-name="Text_20_body">Verify you can access:</text:p>
      <text:section text:style-name="Sect1" text:name="Section6">
        <text:p text:style-name="P2"><text:bookmark text:name="code-block-viewer Copy 5"/><text:span text:style-name="Source_20_Text">http://localhost:8080/</text:span><text:span text:style-name="Source_20_Text"><text:span text:style-name="T6">Deploy</text:span></text:span><text:span text:style-name="Source_20_Text">manifest.json</text:span></text:p>
      </text:section>
      <text:p text:style-name="Text_20_body">and</text:p>
      <text:section text:style-name="Sect1" text:name="Section7">
        <text:p text:style-name="P2"><text:bookmark text:name="code-block-viewer Copy 6"/><text:span text:style-name="Source_20_Text">http://localhost:8080/videos/Guide.mp4</text:span></text:p>
      </text:section>
      <text:p text:style-name="Horizontal_20_Line"/>
      <text:h text:style-name="Heading_20_2" text:outline-level="2">6. Find the server IP</text:h>
      <text:p text:style-name="Text_20_body">Open PowerShell:</text:p>
      <text:section text:style-name="Sect1" text:name="Section8">
        <text:p text:style-name="P2"><text:bookmark text:name="code-block-viewer Copy 7"/><text:span text:style-name="Source_20_Text">ipconfig</text:span></text:p>
      </text:section>
      <text:p text:style-name="Text_20_body">Locate the IPv4 address, for example:</text:p>
      <text:section text:style-name="Sect1" text:name="Section9">
        <text:p text:style-name="P2"><text:bookmark text:name="code-block-viewer Copy 8"/><text:span text:style-name="Source_20_Text">192.168.1.42</text:span></text:p>
      </text:section>
      <text:p text:style-name="Horizontal_20_Line"/>
      <text:h text:style-name="Heading_20_2" text:outline-level="2">7. Test from another device</text:h>
      <text:p text:style-name="Text_20_body">From a phone or Quest Browser connected to the same Wi-Fi:</text:p>
      <text:section text:style-name="Sect1" text:name="Section10">
        <text:p text:style-name="P2"><text:bookmark text:name="code-block-viewer Copy 9"/><text:span text:style-name="Source_20_Text">http://192.168.1.42:8080/</text:span></text:p>
      </text:section>
      <text:p text:style-name="Text_20_body">If this works, the headsets will also be able to download content.</text:p>
      <text:p text:style-name="Horizontal_20_Line"/>
      <text:h text:style-name="Heading_20_2" text:outline-level="2">8. Configure the Unity app</text:h>
      <text:p text:style-name="Text_20_body">Set the base URL to the server:</text:p>
      <text:section text:style-name="Sect1" text:name="Section11">
        <text:p text:style-name="P2"><text:bookmark text:name="code-block-viewer Copy 10"/><text:span text:style-name="Source_20_Text">public static string BaseUrl = "http://192.168.1.42:8080/";</text:span></text:p>
      </text:section>
      <text:p text:style-name="Text_20_body">The app will then request:</text:p>
      <text:section text:style-name="Sect1" text:name="Section12">
        <text:p text:style-name="P3"><text:bookmark text:name="code-block-viewer Copy 11"/><text:span text:style-name="Source_20_Text">GET /</text:span><text:span text:style-name="Source_20_Text"><text:span text:style-name="T7">Deploy/</text:span></text:span><text:span text:style-name="Source_20_Text">manifest.json</text:span></text:p>
        <text:p text:style-name="P5"><text:span text:style-name="Source_20_Text"><text:span text:style-name="T7">etc</text:span></text:span></text:p>
      </text:section>
      <text:p text:style-name="Horizontal_20_Line"/>
      <text:h text:style-name="Heading_20_1" text:outline-level="1"><text:soft-page-break/>Updating content</text:h>
      <text:p text:style-name="Text_20_body">To publish new videos:</text:p>
      <text:list text:style-name="L1">
        <text:list-item>
          <text:p text:style-name="P6">Replace or add files in <text:span text:style-name="Source_20_Text">videos/</text:span> </text:p>
        </text:list-item>
        <text:list-item>
          <text:p text:style-name="P6">Run <text:span text:style-name="Source_20_Text">generate</text:span><text:span text:style-name="Source_20_Text"><text:span text:style-name="T3">_</text:span></text:span><text:span text:style-name="Source_20_Text">manifest.</text:span><text:span text:style-name="Source_20_Text"><text:span text:style-name="T8">sh</text:span></text:span> </text:p>
        </text:list-item>
        <text:list-item>
          <text:p text:style-name="P6">Ensure Caddy is running (or restart it if you've stopped it) </text:p>
        </text:list-item>
        <text:list-item>
          <text:p text:style-name="P7">Launch the app on the Quest headsets </text:p>
        </text:list-item>
      </text:list>
      <text:p text:style-name="Text_20_body">Each headset/<text:span text:style-name="T9">tablet</text:span> will compare the new manifest with its local files and download only the content that is missing or has changed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17:32:10.009842000</meta:creation-date>
    <dc:date>2026-06-30T17:47:28.970807000</dc:date>
    <meta:editing-duration>PT10M1S</meta:editing-duration>
    <meta:editing-cycles>11</meta:editing-cycles>
    <meta:generator>LibreOffice/25.8.1.1$MacOSX_AARCH64 LibreOffice_project/54047653041915e595ad4e45cccea684809c77b5</meta:generator>
    <meta:document-statistic meta:table-count="0" meta:image-count="0" meta:object-count="0" meta:page-count="3" meta:paragraph-count="58" meta:word-count="263" meta:character-count="1807" meta:non-whitespace-character-count="1584"/>
  </office:meta>
</office:document-meta>
</file>